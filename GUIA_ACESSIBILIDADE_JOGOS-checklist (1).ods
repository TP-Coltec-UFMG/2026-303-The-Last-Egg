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Questrial" svg:font-family="Quest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7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16.161cm"/>
    </style:style>
    <style:style style:name="co4" style:family="table-column">
      <style:table-column-properties fo:break-before="auto" style:column-width="8.186cm"/>
    </style:style>
    <style:style style:name="co5" style:family="table-column">
      <style:table-column-properties fo:break-before="auto" style:column-width="7.585cm"/>
    </style:style>
    <style:style style:name="co6" style:family="table-column">
      <style:table-column-properties fo:break-before="auto" style:column-width="19.1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0.737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ta1" style:family="table" style:master-page-name="PageStyle_5f_DESCRIÇÃO">
      <style:table-properties table:display="true" style:writing-mode="lr-tb"/>
    </style:style>
    <style:style style:name="ta2" style:family="table" style:master-page-name="PageStyle_5f_Motora">
      <style:table-properties table:display="true" style:writing-mode="lr-tb"/>
    </style:style>
    <style:style style:name="ta3" style:family="table" style:master-page-name="PageStyle_5f_Cognitiva">
      <style:table-properties table:display="true" style:writing-mode="lr-tb"/>
    </style:style>
    <style:style style:name="ta4" style:family="table" style:master-page-name="PageStyle_5f_Visão">
      <style:table-properties table:display="true" style:writing-mode="lr-tb"/>
    </style:style>
    <style:style style:name="ta5" style:family="table" style:master-page-name="PageStyle_5f_Audição">
      <style:table-properties table:display="true" style:writing-mode="lr-tb"/>
    </style:style>
    <style:style style:name="ta6" style:family="table" style:master-page-name="PageStyle_5f_Fala">
      <style:table-properties table:display="true" style:writing-mode="lr-tb"/>
    </style:style>
    <style:style style:name="ta7" style:family="table" style:master-page-name="PageStyle_5f_Geral">
      <style:table-properties table:display="true" style:writing-mode="lr-tb"/>
    </style:style>
    <style:style style:name="ce1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DESCRIÇÃO.A19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0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Motora.A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7777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2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26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Motora.A1"/>
    </style:style>
    <style:style style:name="ce21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Motora.A1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2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1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Motora.A26"/>
    </style:style>
    <style:style style:name="ce55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Cognitiva.A1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7777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4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32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Cognitiva.A1"/>
    </style:style>
    <style:style style:name="ce67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Cognitiva.A1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14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Cognitiva.A32"/>
    </style:style>
    <style:style style:name="ce72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Visão.A1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4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3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28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Visão.A1"/>
    </style:style>
    <style:style style:name="ce8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Visão.A1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4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13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Visão.A28"/>
    </style:style>
    <style:style style:name="ce92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Audição.A1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4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0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23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3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4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0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1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Audição.A23"/>
    </style:style>
    <style:style style:name="ce109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Fala.A1"/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5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8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4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Fala.A1"/>
    </style:style>
    <style:style style:name="ce122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Fala.A1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5"/>
    </style:style>
    <style:style style:name="ce1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8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4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Fala.A1"/>
    </style:style>
    <style:style style:name="ce127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is-true-formula(INDIRECT(&quot;b&quot;&amp;ROW())=&quot;No&quot;)" style:apply-style-name="ConditionalStyle_5f_1" style:base-cell-address="Geral.A1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25pt" fo:font-style="normal" fo:text-shadow="none" style:text-underline-style="none" fo:font-weight="normal" style:font-size-asian="25pt" style:font-style-asian="normal" style:font-weight-asian="normal" style:font-name-complex="Questrial" style:font-size-complex="25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6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c3c3c" style:text-outline="false" style:text-line-through-style="none" style:text-line-through-type="none" style:font-name="Questrial" fo:font-size="17pt" fo:font-style="normal" fo:text-shadow="none" style:text-underline-style="none" fo:font-weight="normal" style:font-size-asian="17pt" style:font-style-asian="normal" style:font-weight-asian="normal" style:font-name-complex="Questrial" style:font-size-complex="17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3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23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Geral.A1"/>
    </style:style>
    <style:style style:name="ce140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Calibri" style:font-size-complex="10pt" style:font-style-complex="italic" style:font-weight-complex="normal"/>
      <style:map style:condition="is-true-formula(INDIRECT(&quot;b&quot;&amp;ROW())=&quot;No&quot;)" style:apply-style-name="ConditionalStyle_5f_1" style:base-cell-address="Geral.A1"/>
    </style:style>
    <style:style style:name="ce1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"/>
    </style:style>
    <style:style style:name="ce1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6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13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NDIRECT(&quot;b&quot;&amp;ROW())=&quot;No&quot;)" style:apply-style-name="ConditionalStyle_5f_1" style:base-cell-address="Geral.A23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Calibri" style:font-style-complex="normal" style:font-style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563c1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563c1" style:text-position="0% 100%" style:font-name-complex="Calibri" style:font-size-asian="11pt" style:font-size-complex="11pt" style:font-weight-asian="normal" style:font-weight-complex="normal" style:font-name="Calibri" fo:font-style="italic" style:font-style-asian="italic" style:font-style-complex="italic"/>
    </style:style>
    <style:style style:name="T5" style:family="text">
      <style:text-properties fo:text-shadow="none" fo:font-size="11pt" fo:font-weight="normal" style:text-underline-style="none" style:text-underline-color="font-color" style:text-line-through-type="none" style:text-outline="false" fo:color="#0563c1" style:text-position="0% 100%" style:font-name-complex="Calibri" style:font-size-asian="11pt" style:font-size-complex="11pt" style:font-weight-asian="normal" style:font-weight-complex="normal" style:font-name="Calibri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CRIÇÃ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Guia para Estudo de Acessibilidade em Jogos Digitai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daptada pela Professora Doutora Virgínia Fernandes Mota</text:p>
          </table:table-cell>
          <table:table-cell table:number-columns-repeated="63"/>
        </table:table-row>
        <table:table-row table:style-name="ro2">
          <table:table-cell table:style-name="ce3"/>
          <table:table-cell table:number-columns-repeated="63"/>
        </table:table-row>
        <table:table-row table:style-name="ro1">
          <table:table-cell table:style-name="ce4" office:value-type="string" calcext:value-type="string">
            <text:p>As deficiências são dividas nos tipos: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Motora.A1" xlink:type="simple">Motora: deficiências de controle e mobilidade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Cognitiva.A1" xlink:type="simple">Cognitiva: deficiências de processamento de informação, memória e intelectual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'Visão'.A1" xlink:type="simple">Visão: baixa visão e cegueira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'Audição'.A1" xlink:type="simple">Audição: baixa audição e surdez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Fala.A1" xlink:type="simple">Fala: deficiências da fala.</text:a>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a xlink:href="#Geral.A1" xlink:type="simple">Geral: dificuldades gerais não necessariamente ligadas a um tipo específico de deficiência.</text:a></text:p>
          </table:table-cell>
          <table:table-cell table:number-columns-repeated="63"/>
        </table:table-row>
        <table:table-row table:style-name="ro1">
          <table:table-cell table:style-name="ce6"/>
          <table:table-cell table:number-columns-repeated="63"/>
        </table:table-row>
        <table:table-row table:style-name="ro1">
          <table:table-cell table:style-name="ce4" office:value-type="string" calcext:value-type="string">
            <text:p>As funcionalidades de acessibilidade possuem três níveis: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Básica</text:span><text:span text:style-name="T2">: Fácil de implementar, amplo alcance e aplicável a quase todas as mecânicas de jogo</text:span>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Intermediária</text:span><text:span text:style-name="T2">: Requer algum planejamento e esforço, mas muitas vezes apenas um bom design geral do jogo</text:span></text:p>
          </table:table-cell>
          <table:table-cell table:number-columns-repeated="63"/>
        </table:table-row>
        <table:table-row table:style-name="ro3">
          <table:table-cell table:style-name="ce6" office:value-type="string" calcext:value-type="string">
            <text:p><text:span text:style-name="T1">Avançada</text:span><text:span text:style-name="T2">: Adaptações complexas para deficiências mais altas e mecânicas de nicho específico</text:span></text:p>
          </table:table-cell>
          <table:table-cell table:number-columns-repeated="63"/>
        </table:table-row>
        <table:table-row table:style-name="ro1" table:number-rows-repeated="3">
          <table:table-cell table:style-name="ce6"/>
          <table:table-cell table:number-columns-repeated="63"/>
        </table:table-row>
        <table:table-row table:style-name="ro4">
          <table:table-cell table:style-name="ce7" office:value-type="string" calcext:value-type="string">
            <text:p>© gameaccessibilityguidelines.com</text:p>
          </table:table-cell>
          <table:table-cell table:number-columns-repeated="63"/>
        </table:table-row>
        <table:table-row table:style-name="ro2">
          <table:table-cell table:style-name="ce8" office:value-type="string" calcext:value-type="string">
            <text:p>Esta planilha é baseada no trabalho:</text:p>
          </table:table-cell>
          <table:table-cell table:number-columns-repeated="63"/>
        </table:table-row>
        <table:table-row table:style-name="ro2">
          <table:table-cell table:style-name="ce9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number-columns-repeated="63"/>
        </table:table-row>
        <table:table-row table:style-name="ro5" table:number-rows-repeated="1048554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ESCRIÇÃO.A19:DESCRIÇÃO.A19">
            <calcext:condition calcext:apply-style-name="ConditionalStyle_1" calcext:value="formula-is(INDIRECT(&quot;b&quot;&amp;ROW())=&quot;No&quot;)" calcext:base-cell-address="DESCRIÇÃO.A19"/>
          </calcext:conditional-format>
        </calcext:conditional-formats>
      </table:table>
      <table:table table:name="Motor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0" office:value-type="string" calcext:value-type="string">
            <text:p>Guia</text:p>
          </table:table-cell>
          <table:table-cell table:style-name="ce10" office:value-type="string" calcext:value-type="string">
            <text:p>É relevante para a mecânica?</text:p>
          </table:table-cell>
          <table:table-cell table:style-name="ce10" office:value-type="string" calcext:value-type="string">
            <text:p>Está implementado?</text:p>
          </table:table-cell>
          <table:table-cell table:style-name="ce10" office:value-type="string" calcext:value-type="string">
            <text:p>Comentários</text:p>
          </table:table-cell>
          <table:table-cell table:style-name="ce10" table:number-columns-repeated="22"/>
          <table:table-cell table:number-columns-repeated="38"/>
        </table:table-row>
        <table:table-row table:style-name="ro7">
          <table:table-cell table:style-name="ce11"/>
          <table:table-cell table:style-name="ce23" office:value-type="string" calcext:value-type="string">
            <text:p>("no" já esconde a linha automaticamente)</text:p>
          </table:table-cell>
          <table:table-cell table:style-name="ce18" table:number-columns-repeated="24"/>
          <table:table-cell table:number-columns-repeated="38"/>
        </table:table-row>
        <table:table-row table:style-name="ro8">
          <table:table-cell table:style-name="ce11" office:value-type="string" calcext:value-type="string">
            <text:p>Motora</text:p>
          </table:table-cell>
          <table:table-cell table:style-name="ce18" table:number-columns-repeated="25"/>
          <table:table-cell table:number-columns-repeated="38"/>
        </table:table-row>
        <table:table-row table:style-name="ro1">
          <table:table-cell table:style-name="ce12" office:value-type="string" calcext:value-type="string">
            <text:p>(Controle / mobilidade)</text:p>
          </table:table-cell>
          <table:table-cell table:style-name="ce18" table:number-columns-repeated="25"/>
          <table:table-cell table:number-columns-repeated="38"/>
        </table:table-row>
        <table:table-row table:style-name="ro2">
          <table:table-cell table:style-name="ce13"/>
          <table:table-cell table:style-name="ce18" table:number-columns-repeated="25"/>
          <table:table-cell table:number-columns-repeated="38"/>
        </table:table-row>
        <table:table-row table:style-name="ro9">
          <table:table-cell table:style-name="ce14" office:value-type="string" calcext:value-type="string">
            <text:p>Básica</text:p>
          </table:table-cell>
          <table:table-cell table:style-name="ce18" table:number-columns-repeated="25"/>
          <table:table-cell table:number-columns-repeated="38"/>
        </table:table-row>
        <table:table-row table:style-name="ro10">
          <table:table-cell table:style-name="ce15" office:value-type="string" calcext:value-type="string">
            <text:p>Permitir que os controles sejam remapeados/reconfigurad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1">
          <table:table-cell table:style-name="ce15" office:value-type="string" calcext:value-type="string">
            <text:p>Garantir que os controles sejam tão simples quanto possível ou forneça uma alternativa simplificada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office:value-type="string" calcext:value-type="string">
            <text:p>Os controles serão poucos e simples, além da possibilidade de jogar todos o jogo utilizando apenas um método de entrada</text:p>
          </table:table-cell>
          <table:table-cell table:style-name="ce18" table:number-columns-repeated="22"/>
          <table:table-cell table:number-columns-repeated="38"/>
        </table:table-row>
        <table:table-row table:style-name="ro11">
          <table:table-cell table:style-name="ce15" office:value-type="string" calcext:value-type="string">
            <text:p>Certifique-se de que todas as áreas da interface do usuário possam ser acessadas usando o mesmo método de entrada do jogo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0">
          <table:table-cell table:style-name="ce15" office:value-type="string" calcext:value-type="string">
            <text:p>Incluir uma opção para ajustar a sensibilidade dos controle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Garanta que os elementos interativos/controles virtuais sejam grandes e bem espaçados, especialmente em telas pequenas ou sensíveis ao toque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2">
          <table:table-cell table:style-name="ce16"/>
          <table:table-cell table:style-name="ce24" table:number-columns-repeated="25"/>
          <table:table-cell table:number-columns-repeated="38"/>
        </table:table-row>
        <table:table-row table:style-name="ro9">
          <table:table-cell table:style-name="ce14" office:value-type="string" calcext:value-type="string">
            <text:p>Intermediária</text:p>
          </table:table-cell>
          <table:table-cell table:style-name="ce25" table:number-columns-repeated="25"/>
          <table:table-cell table:number-columns-repeated="38"/>
        </table:table-row>
        <table:table-row table:style-name="ro10">
          <table:table-cell table:style-name="ce15" office:value-type="string" calcext:value-type="string">
            <text:p>Suportar mais de um dispositivo de entrada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Tornar elementos interativos que exigem precisão (por exemplo, opções de menu controladas por cursor/toque) estacionári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2">
          <table:table-cell table:style-name="ce15" office:value-type="string" calcext:value-type="string">
            <text:p>Certifique-se de que múltiplas ações simultâneas (por exemplo, clicar/arrastar ou deslizar) não sejam necessárias e sejam incluídas apenas como um método de entrada complementar/alternativo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Não</text:p>
          </table:table-cell>
          <table:table-cell table:style-name="ce18" office:value-type="string" calcext:value-type="string">
            <text:p>Os elementos serão estacionários, porém como o jogo possui batalha contra bosses, infelizmente é necessário ações simultâneas (não conseguimos pensar em uma maneira de mitigar isso), entretanto sem entradas complexas</text:p>
          </table:table-cell>
          <table:table-cell table:style-name="ce18" table:number-columns-repeated="22"/>
          <table:table-cell table:number-columns-repeated="38"/>
        </table:table-row>
        <table:table-row table:style-name="ro13">
          <table:table-cell table:style-name="ce15" office:value-type="string" calcext:value-type="string">
            <text:p>Garantir que todas as ações principais possam ser realizadas por controles digitais (teclado/teclas/pressionamentos), com entrada mais complexa (por exemplo, analógica, fala, gesto) não necessária e incluída apenas como métodos de entrada complementares/alternativ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table:number-columns-repeated="23"/>
          <table:table-cell table:number-columns-repeated="38"/>
        </table:table-row>
        <table:table-row table:style-name="ro10">
          <table:table-cell table:style-name="ce15" office:value-type="string" calcext:value-type="string">
            <text:p>Incluir uma opção para ajustar a velocidade do jogo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0">
          <table:table-cell table:style-name="ce15" office:value-type="string" calcext:value-type="string">
            <text:p>Evite entradas repetidas (eventos de pressionamento de botão/tempo rápido)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1">
          <table:table-cell table:style-name="ce15" office:value-type="string" calcext:value-type="string">
            <text:p>Se estiver produzindo um jogo para PC, suporte ao modo de janela para compatibilidade com teclados virtuais sobreposto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Evite/forneça alternativas para exigir que os botões sejam pressionados</text:p>
          </table:table-cell>
          <table:table-cell table:number-columns-repeated="2" table:style-name="ce18" office:value-type="string" calcext:value-type="string">
            <text:p>Sim</text:p>
          </table:table-cell>
          <table:table-cell table:style-name="ce18" office:value-type="string" calcext:value-type="string">
            <text:p>Iremos indicar quando um botão deve ser pressionado</text:p>
          </table:table-cell>
          <table:table-cell table:style-name="ce18" table:number-columns-repeated="22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que as interfaces sejam reorganiz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que as interfaces sejam redimension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Ser capaz de configurar sequências complexas de ações que podem ser executadas com um único clique ou pressionamento de tecla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tipos variados de corpo em VR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7"/>
          <table:table-cell table:style-name="ce26" table:number-columns-repeated="25"/>
          <table:table-cell table:number-columns-repeated="38"/>
        </table:table-row>
        <table:table-row table:style-name="ro14">
          <table:table-cell table:style-name="ce14" office:value-type="string" calcext:value-type="string">
            <text:p>Avançada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15" office:value-type="string" calcext:value-type="string">
            <text:p>Permitir modo retrato e paisagem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Não tornar o tempo preciso essencial para o jogo – ofereça alternativas, ações que possam ser realizadas durante a pausa ou um mecanismo de pulo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Incluir um período de resfriamento (atraso pós-aceitação) de 0,5 segundos entre as entradas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5" office:value-type="string" calcext:value-type="string">
            <text:p>Fornecer esquemas de controle muito simples que sejam compatíveis com dispositivos de tecnologia assistiva, como switch ou rastreamento ocular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4"/>
          <table:table-cell table:number-columns-repeated="38"/>
        </table:table-row>
        <table:table-row table:style-name="ro14">
          <table:table-cell table:style-name="ce13"/>
          <table:table-cell table:style-name="ce18" table:number-columns-repeated="25"/>
          <table:table-cell table:number-columns-repeated="38"/>
        </table:table-row>
        <table:table-row table:style-name="ro14" table:number-rows-repeated="4">
          <table:table-cell table:style-name="ce18" table:number-columns-repeated="26"/>
          <table:table-cell table:number-columns-repeated="38"/>
        </table:table-row>
        <table:table-row table:style-name="ro14">
          <table:table-cell table:style-name="ce44" office:value-type="string" calcext:value-type="string">
            <text:p>© gameaccessibilityguidelines.com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0" office:value-type="string" calcext:value-type="string">
            <text:p>Esta planilha é baseada no trabalho: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1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8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8" table:number-columns-repeated="25"/>
          <table:table-cell table:number-columns-repeated="38"/>
        </table:table-row>
        <table:table-row table:style-name="ro14" table:number-rows-repeated="784">
          <table:table-cell table:style-name="ce22" table:number-columns-repeated="26"/>
          <table:table-cell table:number-columns-repeated="38"/>
        </table:table-row>
        <table:table-row table:style-name="ro5" table:number-rows-repeated="104775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Motora.A1:Motora.Z11 Motora.A13:Motora.Z25 Motora.A27:Motora.Z32 Motora.A33:Motora.Z39 Motora.B40:Motora.Z40">
            <calcext:condition calcext:apply-style-name="ConditionalStyle_1" calcext:value="formula-is(INDIRECT(&quot;b&quot;&amp;ROW())=&quot;No&quot;)" calcext:base-cell-address="Motora.A1"/>
          </calcext:conditional-format>
          <calcext:conditional-format calcext:target-range-address="Motora.A12:Motora.Z12">
            <calcext:condition calcext:apply-style-name="ConditionalStyle_1" calcext:value="formula-is(INDIRECT(&quot;b&quot;&amp;ROW())=&quot;No&quot;)" calcext:base-cell-address="Motora.A12"/>
          </calcext:conditional-format>
          <calcext:conditional-format calcext:target-range-address="Motora.A26:Motora.Z26">
            <calcext:condition calcext:apply-style-name="ConditionalStyle_1" calcext:value="formula-is(INDIRECT(&quot;b&quot;&amp;ROW())=&quot;No&quot;)" calcext:base-cell-address="Motora.A26"/>
          </calcext:conditional-format>
        </calcext:conditional-formats>
      </table:table>
      <table:table table:name="Cognitiv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55" office:value-type="string" calcext:value-type="string">
            <text:p>Guia</text:p>
          </table:table-cell>
          <table:table-cell table:style-name="ce55" office:value-type="string" calcext:value-type="string">
            <text:p>É relevante para a mecânica?</text:p>
          </table:table-cell>
          <table:table-cell table:style-name="ce55" office:value-type="string" calcext:value-type="string">
            <text:p>Está implementado?</text:p>
          </table:table-cell>
          <table:table-cell table:style-name="ce55" office:value-type="string" calcext:value-type="string">
            <text:p>Comentários</text:p>
          </table:table-cell>
          <table:table-cell table:style-name="ce55" table:number-columns-repeated="22"/>
          <table:table-cell table:number-columns-repeated="38"/>
        </table:table-row>
        <table:table-row table:style-name="ro7">
          <table:table-cell table:style-name="ce56"/>
          <table:table-cell table:style-name="ce68" office:value-type="string" calcext:value-type="string">
            <text:p>("no" já esconde a linha automaticamente)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56" office:value-type="string" calcext:value-type="string">
            <text:p>Cognitiv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57" office:value-type="string" calcext:value-type="string">
            <text:p>(pensamento / memória / processamento de informação)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58"/>
          <table:table-cell table:style-name="ce69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Básic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o jogo seja iniciado sem a necessidade de navegar por vários níveis de menu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um tamanho de fonte padrão facilmente legível 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uma linguagem simples e clar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Usar formatação simples de texto não criptografad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tutoriai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os jogadores progridam através de avisos de texto em seu próprio ritmo</text:p>
          </table:table-cell>
          <table:table-cell table:style-name="ce69" office:value-type="string" calcext:value-type="string">
            <text:p>no</text:p>
          </table:table-cell>
          <table:table-cell table:style-name="ce69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Evitar imagens tremeluzentes e padrões repetitivos</text:p>
          </table:table-cell>
          <table:table-cell table:number-columns-repeated="2" table:style-name="ce69" office:value-type="string" calcext:value-type="string">
            <text:p>Sim</text:p>
          </table:table-cell>
          <table:table-cell table:style-name="ce69" table:number-columns-repeated="23"/>
          <table:table-cell table:number-columns-repeated="38"/>
        </table:table-row>
        <table:table-row table:style-name="ro14">
          <table:table-cell table:style-name="ce62"/>
          <table:table-cell table:style-name="ce70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Intermediária</text:p>
          </table:table-cell>
          <table:table-cell table:style-name="ce69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ajuda/orientação/dicas contextuais no jog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dicar/permitir lembretes dos objetivos atuais durante o jog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dicar/permitir lembrete de controles durante o jog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um meio de praticar sem falhas, como um nível de prática ou modo sandbox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Ter uma estrutura narrativa simples e clar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office:value-type="string" calcext:value-type="string">
            <text:p>O jogo terá uma narrativa curta e clara, além de constantes lembretes dos controles e indicadores para certas ações</text:p>
          </table:table-cell>
          <table:table-cell table:style-name="ce64" table:number-columns-repeated="22"/>
          <table:table-cell table:number-columns-repeated="38"/>
        </table:table-row>
        <table:table-row table:style-name="ro14">
          <table:table-cell table:style-name="ce60" office:value-type="string" calcext:value-type="string">
            <text:p>Se estiver usando uma narrativa longa e abrangente, forneça resumos do progress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Certifique-se de que nenhuma informação essencial (especialmente instruções) seja transmitida apenas por texto, reforce com recursos visuais e/ou fal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office:value-type="string" calcext:value-type="string">
            <text:p>Pensar em exemplos ainda</text:p>
          </table:table-cell>
          <table:table-cell table:style-name="ce64" table:number-columns-repeated="22"/>
          <table:table-cell table:number-columns-repeated="38"/>
        </table:table-row>
        <table:table-row table:style-name="ro14">
          <table:table-cell table:style-name="ce60" office:value-type="string" calcext:value-type="string">
            <text:p>Dê uma indicação clara de que os elementos interativos são interativo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ligar/ocultar o movimento de fund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Ter suporte para bate-papo por voz e texto para jogos multijogador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miniaturas de jogo para os jogos salvo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Certifique-se de que as escolhas de som/música para cada objeto/evento principal sejam distintas umas das outras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Incluir uma opção para ajustar a velocidade do jog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 uma escolha de cor de texto, escolha de baixo/alto contraste, no mínimo</text:p>
          </table:table-cell>
          <table:table-cell table:number-columns-repeated="2" table:style-name="ce64" office:value-type="string" calcext:value-type="string">
            <text:p>Sim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Destacar palavras importante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3"/>
          <table:table-cell table:style-name="ce71" table:number-columns-repeated="25"/>
          <table:table-cell table:number-columns-repeated="38"/>
        </table:table-row>
        <table:table-row table:style-name="ro14">
          <table:table-cell table:style-name="ce59" office:value-type="string" calcext:value-type="string">
            <text:p>Avançada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ativar sangue e cenas muito violenta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narrações pré-gravadas para todo o texto, incluindo menus e instaladores</text:p>
          </table:table-cell>
          <table:table-cell table:style-name="ce64" office:value-type="string" calcext:value-type="string">
            <text:p>Sim</text:p>
          </table:table-cell>
          <table:table-cell table:style-name="ce64" office:value-type="string" calcext:value-type="string">
            <text:p>Não</text:p>
          </table:table-cell>
          <table:table-cell table:style-name="ce64" table:number-columns-repeated="23"/>
          <table:table-cell table:number-columns-repeated="38"/>
        </table:table-row>
        <table:table-row table:style-name="ro14">
          <table:table-cell table:style-name="ce60" office:value-type="string" calcext:value-type="string">
            <text:p>Evitar qualquer movimento ou evento repentino e inesperado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Permitir que todas as narrativas e instruções sejam reproduzida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Usar bate-papo baseado em símbolos (smileys, etc.)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60" office:value-type="string" calcext:value-type="string">
            <text:p>Fornecer uma opção para desligar/ocultar todos os elementos não interativos</text:p>
          </table:table-cell>
          <table:table-cell table:style-name="ce64" office:value-type="string" calcext:value-type="string">
            <text:p>no</text:p>
          </table:table-cell>
          <table:table-cell table:style-name="ce64" table:number-columns-repeated="24"/>
          <table:table-cell table:number-columns-repeated="38"/>
        </table:table-row>
        <table:table-row table:style-name="ro14">
          <table:table-cell table:style-name="ce58"/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4" table:number-columns-repeated="26"/>
          <table:table-cell table:number-columns-repeated="38"/>
        </table:table-row>
        <table:table-row table:style-name="ro14">
          <table:table-cell table:style-name="ce65" office:value-type="string" calcext:value-type="string">
            <text:p>© gameaccessibilityguidelines.com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6" office:value-type="string" calcext:value-type="string">
            <text:p>Esta planilha é baseada no trabalho: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67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64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64" table:number-columns-repeated="25"/>
          <table:table-cell table:number-columns-repeated="38"/>
        </table:table-row>
        <table:table-row table:style-name="ro14" table:number-rows-repeated="823">
          <table:table-cell table:style-name="ce64" table:number-columns-repeated="26"/>
          <table:table-cell table:number-columns-repeated="38"/>
        </table:table-row>
        <table:table-row table:style-name="ro5" table:number-rows-repeated="104770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ognitiva.A1:Cognitiva.Z13 Cognitiva.A33:Cognitiva.A44 Cognitiva.A46:Cognitiva.A868 Cognitiva.B33:Cognitiva.Z868 Cognitiva.A15:Cognitiva.Z31">
            <calcext:condition calcext:apply-style-name="ConditionalStyle_1" calcext:value="formula-is(INDIRECT(&quot;b&quot;&amp;ROW())=&quot;No&quot;)" calcext:base-cell-address="Cognitiva.A1"/>
          </calcext:conditional-format>
          <calcext:conditional-format calcext:target-range-address="Cognitiva.A14:Cognitiva.Z14">
            <calcext:condition calcext:apply-style-name="ConditionalStyle_1" calcext:value="formula-is(INDIRECT(&quot;b&quot;&amp;ROW())=&quot;No&quot;)" calcext:base-cell-address="Cognitiva.A14"/>
          </calcext:conditional-format>
          <calcext:conditional-format calcext:target-range-address="Cognitiva.A32:Cognitiva.Z32">
            <calcext:condition calcext:apply-style-name="ConditionalStyle_1" calcext:value="formula-is(INDIRECT(&quot;b&quot;&amp;ROW())=&quot;No&quot;)" calcext:base-cell-address="Cognitiva.A32"/>
          </calcext:conditional-format>
        </calcext:conditional-formats>
      </table:table>
      <table:table table:name="Visão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72" office:value-type="string" calcext:value-type="string">
            <text:p>Guia</text:p>
          </table:table-cell>
          <table:table-cell table:style-name="ce72" office:value-type="string" calcext:value-type="string">
            <text:p>É relevante para a mecânica?</text:p>
          </table:table-cell>
          <table:table-cell table:style-name="ce72" office:value-type="string" calcext:value-type="string">
            <text:p>Está implementado?</text:p>
          </table:table-cell>
          <table:table-cell table:style-name="ce72" office:value-type="string" calcext:value-type="string">
            <text:p>Comentários</text:p>
          </table:table-cell>
          <table:table-cell table:style-name="ce72" table:number-columns-repeated="22"/>
          <table:table-cell table:number-columns-repeated="38"/>
        </table:table-row>
        <table:table-row table:style-name="ro7">
          <table:table-cell table:style-name="ce73"/>
          <table:table-cell table:style-name="ce86" office:value-type="string" calcext:value-type="string">
            <text:p>("no" já esconde a linha automaticamente)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3" office:value-type="string" calcext:value-type="string">
            <text:p>Visão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4"/>
          <table:table-cell table:style-name="ce88" table:number-columns-repeated="25"/>
          <table:table-cell table:number-columns-repeated="38"/>
        </table:table-row>
        <table:table-row table:style-name="ro14">
          <table:table-cell table:style-name="ce46" office:value-type="string" calcext:value-type="string">
            <text:p>Básic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47" office:value-type="string" calcext:value-type="string">
            <text:p>Certifique-se de que nenhuma informação essencial seja transmitida apenas por uma cor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Se o jogo usar campo de visão (somente mecanismo 3D), defina um padrão apropriado para o ambiente de visualização esperado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47" office:value-type="string" calcext:value-type="string">
            <text:p>Evitar gatilhos de enjôo em simulação de VR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47" office:value-type="string" calcext:value-type="string">
            <text:p>Usar um tamanho de fonte padrão facilmente legível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Usar formatação simples de texto não criptografa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Fornecer alto contraste entre texto/UI e plano de fun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47" office:value-type="string" calcext:value-type="string">
            <text:p>Garantir que os elementos interativos/controles virtuais sejam grandes e bem espaçados, especialmente em telas pequenas ou sensíveis ao toque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77"/>
          <table:table-cell table:style-name="ce90" table:number-columns-repeated="25"/>
          <table:table-cell table:number-columns-repeated="38"/>
        </table:table-row>
        <table:table-row table:style-name="ro14">
          <table:table-cell table:style-name="ce78" office:value-type="string" calcext:value-type="string">
            <text:p>Intermediári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9" office:value-type="string" calcext:value-type="string">
            <text:p>Se o jogo usar campo de visão (somente mecanismo 3D), permitir um meio de ajustá-lo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Evitar (ou fornecer a opção de desativar) qualquer diferença entre o movimento do controlador e o movimento da câmera, como movimentos de arma/caminhada ou suavização do mouse</text:p>
          </table:table-cell>
          <table:table-cell table:style-name="ce89" office:value-type="string" calcext:value-type="string">
            <text:p>no</text:p>
          </table:table-cell>
          <table:table-cell table:style-name="ce89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Usar som surround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opção para desligar/ocultar a animação de fundo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o suporte do leitor de tela para dispositivos móveis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opção para ajustar o contraste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que as escolhas de som/música para objetos/eventos principais sejam distintas umas das outra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escolha de cores / designs de cursor / mir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Dê uma indicação clara de que os elementos interativos são interativo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Certifique-se de que o manual/site seja fornecido em um formato compatível com o leitor de tel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Evitar colocar informações temporárias essenciais fora da linha de visão do jogador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que as interfaces sejam redimensionadas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51"/>
          <table:table-cell table:style-name="ce61" table:number-columns-repeated="25"/>
          <table:table-cell table:number-columns-repeated="38"/>
        </table:table-row>
        <table:table-row table:style-name="ro14">
          <table:table-cell table:style-name="ce78" office:value-type="string" calcext:value-type="string">
            <text:p>Avançada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que o tamanho da fonte seja ajustado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 mapa de áudio estilo sonar com ping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narrações pré-gravadas para todo o texto, incluindo menus e instaladores</text:p>
          </table:table-cell>
          <table:table-cell table:style-name="ce89" office:value-type="string" calcext:value-type="string">
            <text:p>Sim</text:p>
          </table:table-cell>
          <table:table-cell table:style-name="ce89" office:value-type="string" calcext:value-type="string">
            <text:p>Não</text:p>
          </table:table-cell>
          <table:table-cell table:style-name="ce89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 GPS com voz 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Permitir fácil orientação/movimento ao longo dos pontos da bússola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que todas as ações principais possam ser realizadas por controles digitais (pads/teclas/pressionamentos), com entradas mais complexas (por exemplo, analógicas, gestos) não necessárias e incluídas apenas como métodos de entrada complementares/alternativos</text:p>
          </table:table-cell>
          <table:table-cell table:number-columns-repeated="2" table:style-name="ce82" office:value-type="string" calcext:value-type="string">
            <text:p>Sim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Garantir suporte ao leitor de tela, incluindo menus e instaladores</text:p>
          </table:table-cell>
          <table:table-cell table:style-name="ce82" office:value-type="string" calcext:value-type="string">
            <text:p>Sim</text:p>
          </table:table-cell>
          <table:table-cell table:style-name="ce82" office:value-type="string" calcext:value-type="string">
            <text:p>Não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Usar design de som/música distinto para todos os objetos e eventos</text:p>
          </table:table-cell>
          <table:table-cell table:number-columns-repeated="2" table:style-name="ce89" office:value-type="string" calcext:value-type="string">
            <text:p>Sim</text:p>
          </table:table-cell>
          <table:table-cell table:style-name="ce89" table:number-columns-repeated="23"/>
          <table:table-cell table:number-columns-repeated="38"/>
        </table:table-row>
        <table:table-row table:style-name="ro14">
          <table:table-cell table:style-name="ce79" office:value-type="string" calcext:value-type="string">
            <text:p>Simular gravação binaural</text:p>
          </table:table-cell>
          <table:table-cell table:style-name="ce82" office:value-type="string" calcext:value-type="string">
            <text:p>no</text:p>
          </table:table-cell>
          <table:table-cell table:style-name="ce82" table:number-columns-repeated="24"/>
          <table:table-cell table:number-columns-repeated="38"/>
        </table:table-row>
        <table:table-row table:style-name="ro14">
          <table:table-cell table:style-name="ce79" office:value-type="string" calcext:value-type="string">
            <text:p>Fornecer uma trilha de audiodescrição</text:p>
          </table:table-cell>
          <table:table-cell table:style-name="ce82" office:value-type="string" calcext:value-type="string">
            <text:p>Sim</text:p>
          </table:table-cell>
          <table:table-cell table:style-name="ce82" office:value-type="string" calcext:value-type="string">
            <text:p>Não</text:p>
          </table:table-cell>
          <table:table-cell table:style-name="ce82" table:number-columns-repeated="23"/>
          <table:table-cell table:number-columns-repeated="38"/>
        </table:table-row>
        <table:table-row table:style-name="ro14">
          <table:table-cell table:style-name="ce81"/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2" table:number-columns-repeated="26"/>
          <table:table-cell table:number-columns-repeated="38"/>
        </table:table-row>
        <table:table-row table:style-name="ro14">
          <table:table-cell table:style-name="ce83" office:value-type="string" calcext:value-type="string">
            <text:p>© gameaccessibilityguidelines.com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4" office:value-type="string" calcext:value-type="string">
            <text:p>Esta planilha é baseada no trabalho: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85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82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82" table:number-columns-repeated="25"/>
          <table:table-cell table:number-columns-repeated="38"/>
        </table:table-row>
        <table:table-row table:style-name="ro14" table:number-rows-repeated="823">
          <table:table-cell table:style-name="ce82" table:number-columns-repeated="26"/>
          <table:table-cell table:number-columns-repeated="38"/>
        </table:table-row>
        <table:table-row table:style-name="ro5" table:number-rows-repeated="104770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isão.A1:Visão.Z3 Visão.A5:Visão.Z12 Visão.A14:Visão.Z27 Visão.A29:Visão.A44 Visão.A46:Visão.A868 Visão.B29:Visão.Z868">
            <calcext:condition calcext:apply-style-name="ConditionalStyle_1" calcext:value="formula-is(INDIRECT(&quot;b&quot;&amp;ROW())=&quot;No&quot;)" calcext:base-cell-address="Visão.A1"/>
          </calcext:conditional-format>
          <calcext:conditional-format calcext:target-range-address="Visão.A4:Visão.Z4">
            <calcext:condition calcext:apply-style-name="ConditionalStyle_1" calcext:value="formula-is(INDIRECT(&quot;b&quot;&amp;ROW())=&quot;No&quot;)" calcext:base-cell-address="Visão.A4"/>
          </calcext:conditional-format>
          <calcext:conditional-format calcext:target-range-address="Visão.A13:Visão.Z13">
            <calcext:condition calcext:apply-style-name="ConditionalStyle_1" calcext:value="formula-is(INDIRECT(&quot;b&quot;&amp;ROW())=&quot;No&quot;)" calcext:base-cell-address="Visão.A13"/>
          </calcext:conditional-format>
          <calcext:conditional-format calcext:target-range-address="Visão.A28:Visão.Z28">
            <calcext:condition calcext:apply-style-name="ConditionalStyle_1" calcext:value="formula-is(INDIRECT(&quot;b&quot;&amp;ROW())=&quot;No&quot;)" calcext:base-cell-address="Visão.A28"/>
          </calcext:conditional-format>
        </calcext:conditional-formats>
      </table:table>
      <table:table table:name="Audição" table:style-name="ta5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92" office:value-type="string" calcext:value-type="string">
            <text:p>Guia</text:p>
          </table:table-cell>
          <table:table-cell table:style-name="ce92" office:value-type="string" calcext:value-type="string">
            <text:p>É relevante para a mecânica?</text:p>
          </table:table-cell>
          <table:table-cell table:style-name="ce92" office:value-type="string" calcext:value-type="string">
            <text:p>Está implementado?</text:p>
          </table:table-cell>
          <table:table-cell table:style-name="ce92" office:value-type="string" calcext:value-type="string">
            <text:p>Comentários</text:p>
          </table:table-cell>
          <table:table-cell table:style-name="ce92" table:number-columns-repeated="22"/>
          <table:table-cell table:number-columns-repeated="38"/>
        </table:table-row>
        <table:table-row table:style-name="ro7">
          <table:table-cell table:style-name="ce93"/>
          <table:table-cell table:style-name="ce104" office:value-type="string" calcext:value-type="string">
            <text:p>("no" já esconde a linha automaticamente)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3" office:value-type="string" calcext:value-type="string">
            <text:p>Audição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4"/>
          <table:table-cell table:style-name="ce105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Básic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para todas as falas importante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office:value-type="string" calcext:value-type="string">
            <text:p>As legendas serão obrigatórias pois o jogo não terá narração, além disso o tamanho e o contraste da legenda poderão ser alteradas pelo usuário</text:p>
          </table:table-cell>
          <table:table-cell table:style-name="ce100" table:number-columns-repeated="22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controles de volume separados ou silenciamentos para efeitos, fala e fundo/música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nenhuma informação essencial seja transmitida apenas por son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Se forem usadas legendas/legendas, apresente-as de forma clara e fácil de ler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7"/>
          <table:table-cell table:style-name="ce106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Intermediári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Manter o ruído de fundo ao mínimo durante a fala</text:p>
          </table:table-cell>
          <table:table-cell table:number-columns-repeated="2" table:style-name="ce107" office:value-type="string" calcext:value-type="string">
            <text:p>Sim</text:p>
          </table:table-cell>
          <table:table-cell table:style-name="ce107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para discurso complementar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as legendas/legendas estejam ou possam ser ativadas antes de qualquer som ser reproduzid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legendas ou imagens para sons de fundo significativos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uma indicação visual de quem está falando no moment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Permitir que a apresentação de legendas/legendas seja personalizada</text:p>
          </table:table-cell>
          <table:table-cell table:style-name="ce100" office:value-type="string" calcext:value-type="string">
            <text:p>Sim</text:p>
          </table:table-cell>
          <table:table-cell table:style-name="ce100" office:value-type="string" calcext:value-type="string">
            <text:p>Não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Suporte para chat de texto e voz para multijogadores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meios visuais de comunicação no modo multijogador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Permitir que seja definida uma preferência para jogar multijogador online com jogadores que só jogarão/estão dispostos a jogar sem chat de voz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todas as informações complementares importantes (por exemplo, a direção de onde você está sendo filmado) transmitidas por áudio sejam replicadas em texto/imagens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uma alternância estéreo/mono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8"/>
          <table:table-cell table:style-name="ce108" table:number-columns-repeated="25"/>
          <table:table-cell table:number-columns-repeated="38"/>
        </table:table-row>
        <table:table-row table:style-name="ro14">
          <table:table-cell table:style-name="ce95" office:value-type="string" calcext:value-type="string">
            <text:p>Avançada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96" office:value-type="string" calcext:value-type="string">
            <text:p>Certifique-se de que as legendas/legendas sejam reduzidas e apresentadas em palavras por minuto apropriadas para a faixa etária do público alvo</text:p>
          </table:table-cell>
          <table:table-cell table:number-columns-repeated="2" table:style-name="ce100" office:value-type="string" calcext:value-type="string">
            <text:p>Sim</text:p>
          </table:table-cell>
          <table:table-cell table:style-name="ce100" table:number-columns-repeated="23"/>
          <table:table-cell table:number-columns-repeated="38"/>
        </table:table-row>
        <table:table-row table:style-name="ro14">
          <table:table-cell table:style-name="ce96" office:value-type="string" calcext:value-type="string">
            <text:p>Fornecer assinatura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6" office:value-type="string" calcext:value-type="string">
            <text:p>Usar bate-papo baseado em símbolos (smileys, etc.)</text:p>
          </table:table-cell>
          <table:table-cell table:style-name="ce100" office:value-type="string" calcext:value-type="string">
            <text:p>no</text:p>
          </table:table-cell>
          <table:table-cell table:style-name="ce100" table:number-columns-repeated="24"/>
          <table:table-cell table:number-columns-repeated="38"/>
        </table:table-row>
        <table:table-row table:style-name="ro14">
          <table:table-cell table:style-name="ce99"/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0" table:number-columns-repeated="26"/>
          <table:table-cell table:number-columns-repeated="38"/>
        </table:table-row>
        <table:table-row table:style-name="ro14">
          <table:table-cell table:style-name="ce101" office:value-type="string" calcext:value-type="string">
            <text:p>© gameaccessibilityguidelines.com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2" office:value-type="string" calcext:value-type="string">
            <text:p>Esta planilha é baseada no trabalho: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103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00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00" table:number-columns-repeated="25"/>
          <table:table-cell table:number-columns-repeated="38"/>
        </table:table-row>
        <table:table-row table:style-name="ro14" table:number-rows-repeated="823">
          <table:table-cell table:style-name="ce100" table:number-columns-repeated="26"/>
          <table:table-cell table:number-columns-repeated="38"/>
        </table:table-row>
        <table:table-row table:style-name="ro5" table:number-rows-repeated="104771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Audição.A1:Audição.Z3 Audição.A5:Audição.Z9 Audição.A11:Audição.Z22 Audição.A24:Audição.A32 Audição.A34:Audição.A856 Audição.B24:Audição.Z856">
            <calcext:condition calcext:apply-style-name="ConditionalStyle_1" calcext:value="formula-is(INDIRECT(&quot;b&quot;&amp;ROW())=&quot;No&quot;)" calcext:base-cell-address="Audição.A1"/>
          </calcext:conditional-format>
          <calcext:conditional-format calcext:target-range-address="Audição.A4:Audição.Z4">
            <calcext:condition calcext:apply-style-name="ConditionalStyle_1" calcext:value="formula-is(INDIRECT(&quot;b&quot;&amp;ROW())=&quot;No&quot;)" calcext:base-cell-address="Audição.A4"/>
          </calcext:conditional-format>
          <calcext:conditional-format calcext:target-range-address="Audição.A10:Audição.Z10">
            <calcext:condition calcext:apply-style-name="ConditionalStyle_1" calcext:value="formula-is(INDIRECT(&quot;b&quot;&amp;ROW())=&quot;No&quot;)" calcext:base-cell-address="Audição.A10"/>
          </calcext:conditional-format>
          <calcext:conditional-format calcext:target-range-address="Audição.A23:Audição.Z23">
            <calcext:condition calcext:apply-style-name="ConditionalStyle_1" calcext:value="formula-is(INDIRECT(&quot;b&quot;&amp;ROW())=&quot;No&quot;)" calcext:base-cell-address="Audição.A23"/>
          </calcext:conditional-format>
        </calcext:conditional-formats>
      </table:table>
      <table:table table:name="Fala" table:style-name="ta6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09" office:value-type="string" calcext:value-type="string">
            <text:p>Guia</text:p>
          </table:table-cell>
          <table:table-cell table:style-name="ce109" office:value-type="string" calcext:value-type="string">
            <text:p>É relevante para a mecânica?</text:p>
          </table:table-cell>
          <table:table-cell table:style-name="ce109" office:value-type="string" calcext:value-type="string">
            <text:p>Está implementado?</text:p>
          </table:table-cell>
          <table:table-cell table:style-name="ce109" office:value-type="string" calcext:value-type="string">
            <text:p>Comentários</text:p>
          </table:table-cell>
          <table:table-cell table:style-name="ce109" table:number-columns-repeated="22"/>
          <table:table-cell table:number-columns-repeated="38"/>
        </table:table-row>
        <table:table-row table:style-name="ro7">
          <table:table-cell table:style-name="ce110"/>
          <table:table-cell table:style-name="ce118" office:value-type="string" calcext:value-type="string">
            <text:p>("no" já esconde a linha automaticamente)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1"/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0" office:value-type="string" calcext:value-type="string">
            <text:p>Fal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2"/>
          <table:table-cell table:style-name="ce123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Básic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Certifique-se de que a entrada de voz não seja necessária e incluída apenas como um método de entrada complementar/alternativo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5"/>
          <table:table-cell table:style-name="ce124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Intermediári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Permitir que seja definida uma preferência para jogar multijogador online com jogadores que só jogarão/estão dispostos a jogar sem chat de voz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Suporte para bate-papo por texto e voz para multijogador online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Fornecer meios visuais de comunicação no modo multijogador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Baseie o reconhecimento de fala em palavras individuais de um vocabulário pequeno (por exemplo, ‘sim’ ‘não’ ‘aberto’) em vez de frases longas ou palavras multissílabas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6"/>
          <table:table-cell table:style-name="ce125" table:number-columns-repeated="25"/>
          <table:table-cell table:number-columns-repeated="38"/>
        </table:table-row>
        <table:table-row table:style-name="ro14">
          <table:table-cell table:style-name="ce113" office:value-type="string" calcext:value-type="string">
            <text:p>Avançada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14" office:value-type="string" calcext:value-type="string">
            <text:p>Baseie o reconhecimento de fala em atingir um limite de volume (por exemplo, 50%) em vez de palavras</text:p>
          </table:table-cell>
          <table:table-cell table:style-name="ce119" office:value-type="string" calcext:value-type="string">
            <text:p>no</text:p>
          </table:table-cell>
          <table:table-cell table:style-name="ce119" table:number-columns-repeated="24"/>
          <table:table-cell table:number-columns-repeated="38"/>
        </table:table-row>
        <table:table-row table:style-name="ro14">
          <table:table-cell table:style-name="ce114" office:value-type="string" calcext:value-type="string">
            <text:p>Use bate-papo baseado em símbolos (smileys, etc.)</text:p>
          </table:table-cell>
          <table:table-cell table:style-name="ce126" office:value-type="string" calcext:value-type="string">
            <text:p>no</text:p>
          </table:table-cell>
          <table:table-cell table:style-name="ce126" table:number-columns-repeated="24"/>
          <table:table-cell table:number-columns-repeated="38"/>
        </table:table-row>
        <table:table-row table:style-name="ro14">
          <table:table-cell table:style-name="ce87"/>
          <table:table-cell table:style-name="ce126" table:number-columns-repeated="25"/>
          <table:table-cell table:number-columns-repeated="38"/>
        </table:table-row>
        <table:table-row table:style-name="ro14">
          <table:table-cell table:style-name="ce118"/>
          <table:table-cell table:style-name="ce119" table:number-columns-repeated="25"/>
          <table:table-cell table:number-columns-repeated="38"/>
        </table:table-row>
        <table:table-row table:style-name="ro14" table:number-rows-repeated="4">
          <table:table-cell table:style-name="ce119" table:number-columns-repeated="26"/>
          <table:table-cell table:number-columns-repeated="38"/>
        </table:table-row>
        <table:table-row table:style-name="ro14">
          <table:table-cell table:style-name="ce120" office:value-type="string" calcext:value-type="string">
            <text:p>© gameaccessibilityguidelines.com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21" office:value-type="string" calcext:value-type="string">
            <text:p>Esta planilha é baseada no trabalho: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122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19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19" table:number-columns-repeated="25"/>
          <table:table-cell table:number-columns-repeated="38"/>
        </table:table-row>
        <table:table-row table:style-name="ro14" table:number-rows-repeated="818">
          <table:table-cell table:style-name="ce119" table:number-columns-repeated="26"/>
          <table:table-cell table:number-columns-repeated="38"/>
        </table:table-row>
        <table:table-row table:style-name="ro5" table:number-rows-repeated="10477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Fala.A1:Fala.Z4 Fala.A6:Fala.Z7 Fala.A9:Fala.Z13 Fala.A15:Fala.A26 Fala.A28:Fala.A845 Fala.B15:Fala.Z845">
            <calcext:condition calcext:apply-style-name="ConditionalStyle_1" calcext:value="formula-is(INDIRECT(&quot;b&quot;&amp;ROW())=&quot;No&quot;)" calcext:base-cell-address="Fala.A1"/>
          </calcext:conditional-format>
          <calcext:conditional-format calcext:target-range-address="Fala.A5:Fala.Z5">
            <calcext:condition calcext:apply-style-name="ConditionalStyle_1" calcext:value="formula-is(INDIRECT(&quot;b&quot;&amp;ROW())=&quot;No&quot;)" calcext:base-cell-address="Fala.A5"/>
          </calcext:conditional-format>
          <calcext:conditional-format calcext:target-range-address="Fala.A8:Fala.Z8">
            <calcext:condition calcext:apply-style-name="ConditionalStyle_1" calcext:value="formula-is(INDIRECT(&quot;b&quot;&amp;ROW())=&quot;No&quot;)" calcext:base-cell-address="Fala.A8"/>
          </calcext:conditional-format>
          <calcext:conditional-format calcext:target-range-address="Fala.A14:Fala.Z14">
            <calcext:condition calcext:apply-style-name="ConditionalStyle_1" calcext:value="formula-is(INDIRECT(&quot;b&quot;&amp;ROW())=&quot;No&quot;)" calcext:base-cell-address="Fala.A14"/>
          </calcext:conditional-format>
        </calcext:conditional-formats>
      </table:table>
      <table:table table:name="Geral" table:style-name="ta7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0" table:default-cell-style-name="Default"/>
        <table:table-column table:style-name="co2" table:number-columns-repeated="38" table:default-cell-style-name="Default"/>
        <table:table-row table:style-name="ro6">
          <table:table-cell table:style-name="ce127" office:value-type="string" calcext:value-type="string">
            <text:p>Guia</text:p>
          </table:table-cell>
          <table:table-cell table:style-name="ce127" office:value-type="string" calcext:value-type="string">
            <text:p>É relevante para a mecânica?</text:p>
          </table:table-cell>
          <table:table-cell table:style-name="ce127" office:value-type="string" calcext:value-type="string">
            <text:p>Está implementado?</text:p>
          </table:table-cell>
          <table:table-cell table:style-name="ce127" office:value-type="string" calcext:value-type="string">
            <text:p>Comentários</text:p>
          </table:table-cell>
          <table:table-cell table:style-name="ce127" table:number-columns-repeated="22"/>
          <table:table-cell table:number-columns-repeated="38"/>
        </table:table-row>
        <table:table-row table:style-name="ro7">
          <table:table-cell table:style-name="ce128"/>
          <table:table-cell table:style-name="ce137" office:value-type="string" calcext:value-type="string">
            <text:p>("no" já esconde a linha automaticamente)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29"/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0"/>
          <table:table-cell table:style-name="ce141" table:number-columns-repeated="25"/>
          <table:table-cell table:number-columns-repeated="38"/>
        </table:table-row>
        <table:table-row table:style-name="ro14">
          <table:table-cell table:style-name="ce128" office:value-type="string" calcext:value-type="string">
            <text:p>Geral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1"/>
          <table:table-cell table:style-name="ce142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Básic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detalhes dos recursos de acessibilidade nos materiais complementares do jog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office:value-type="string" calcext:value-type="string">
            <text:p>Teremos uma opção extra nos créditos que irão explicar de forma mais detalhada os recursos de acessibilidade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detalhes dos recursos de acessibilidade no jog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Oferecer uma ampla escolha de níveis de dificuldade</text:p>
          </table:table-cell>
          <table:table-cell table:style-name="ce141" office:value-type="string" calcext:value-type="string">
            <text:p>no</text:p>
          </table:table-cell>
          <table:table-cell table:style-name="ce141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Certifique-se de que todas as configurações sejam salvas/lembradas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Solicite feedback sobre acessibilidade</text:p>
          </table:table-cell>
          <table:table-cell table:number-columns-repeated="2" table:style-name="ce141" office:value-type="string" calcext:value-type="string">
            <text:p>Sim</text:p>
          </table:table-cell>
          <table:table-cell table:style-name="ce141" office:value-type="string" calcext:value-type="string">
            <text:p>Não temos certeza de como iremos salvar esse feedback, mas pelo menos iremos pedir</text:p>
          </table:table-cell>
          <table:table-cell table:style-name="ce141" table:number-columns-repeated="22"/>
          <table:table-cell table:number-columns-repeated="38"/>
        </table:table-row>
        <table:table-row table:style-name="ro14">
          <table:table-cell table:style-name="ce134"/>
          <table:table-cell table:style-name="ce143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Intermediári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o nível de dificuldade seja alterado durante o jogo, seja através de configurações ou dificuldade adaptativ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Incluir algumas pessoas com deficiência entre os participantes do teste</text:p>
          </table:table-cell>
          <table:table-cell table:number-columns-repeated="2" table:style-name="ce136" office:value-type="string" calcext:value-type="string">
            <text:p>???</text:p>
          </table:table-cell>
          <table:table-cell table:style-name="ce136" office:value-type="string" calcext:value-type="string">
            <text:p>Ainda não temos certeza se iremos fazer esses testes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Oferecer um meio de contornar elementos de jogo que não fazem parte da mecânica principal, por meio de configurações ou opção de pular no jogo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Incluir modos de assistência, como mira automática e direção assistid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um recurso de salvamento manual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office:value-type="string" calcext:value-type="string">
            <text:p>Estamos um pouco na dúvida se implementamos ambos os salvamentos ou apenas um deles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Fornecer um recurso de salvamento automático</text:p>
          </table:table-cell>
          <table:table-cell table:number-columns-repeated="2" table:style-name="ce136" office:value-type="string" calcext:value-type="string">
            <text:p>Sim</text:p>
          </table:table-cell>
          <table:table-cell table:style-name="ce136" table:number-columns-repeated="23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seja definida uma preferência para jogar multijogador online com/sem outras pessoas que estejam usando recursos de acessibilidade que possam oferecer uma vantagem competitiv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a que a jogabilidade seja ajustada 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5"/>
          <table:table-cell table:style-name="ce144" table:number-columns-repeated="25"/>
          <table:table-cell table:number-columns-repeated="38"/>
        </table:table-row>
        <table:table-row table:style-name="ro14">
          <table:table-cell table:style-name="ce132" office:value-type="string" calcext:value-type="string">
            <text:p>Avançada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3" office:value-type="string" calcext:value-type="string">
            <text:p><text:span text:style-name="T3">Incluir todas as categorias relevantes de deficiência (motora, cognitiva, etc.) entre os participantes dos </text:span><text:span text:style-name="T4">playtests</text:span><text:span text:style-name="T5">, em números representativos com base na idade/demografia do público-alvo</text:span></text:p>
          </table:table-cell>
          <table:table-cell table:number-columns-repeated="2" table:style-name="ce136" office:value-type="string" calcext:value-type="string">
            <text:p>???</text:p>
          </table:table-cell>
          <table:table-cell table:style-name="ce136" office:value-type="string" calcext:value-type="string">
            <text:p>Também não temos certeza</text:p>
          </table:table-cell>
          <table:table-cell table:style-name="ce136" table:number-columns-repeated="22"/>
          <table:table-cell table:number-columns-repeated="38"/>
        </table:table-row>
        <table:table-row table:style-name="ro14">
          <table:table-cell table:style-name="ce133" office:value-type="string" calcext:value-type="string">
            <text:p>Permitir que as configurações sejam salvas em diferentes perfis, tanto no jogo quanto na plataform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3" office:value-type="string" calcext:value-type="string">
            <text:p>Texto em tempo real &lt;-&gt; transcrição de fala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4"/>
          <table:table-cell table:number-columns-repeated="38"/>
        </table:table-row>
        <table:table-row table:style-name="ro14">
          <table:table-cell table:style-name="ce136" table:number-columns-repeated="26"/>
          <table:table-cell table:number-columns-repeated="38"/>
        </table:table-row>
        <table:table-row table:style-name="ro14">
          <table:table-cell table:style-name="ce137"/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6" table:number-columns-repeated="26"/>
          <table:table-cell table:number-columns-repeated="38"/>
        </table:table-row>
        <table:table-row table:style-name="ro14">
          <table:table-cell table:style-name="ce138" office:value-type="string" calcext:value-type="string">
            <text:p>© gameaccessibilityguidelines.com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39" office:value-type="string" calcext:value-type="string">
            <text:p>Esta planilha é baseada no trabalho: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140" office:value-type="string" calcext:value-type="string">
            <text:p><text:a xlink:href="https://gameaccessibilityguidelines.com/full-list/" xlink:type="simple">https://gameaccessibilityguidelines.com/full-list/</text:a></text:p>
          </table:table-cell>
          <table:table-cell table:style-name="ce136" table:number-columns-repeated="25"/>
          <table:table-cell table:number-columns-repeated="38"/>
        </table:table-row>
        <table:table-row table:style-name="ro14">
          <table:table-cell table:style-name="ce2" office:value-type="string" calcext:value-type="string">
            <text:p>Adaptada pela Professora Doutora Virgínia Fernandes Mota</text:p>
          </table:table-cell>
          <table:table-cell table:style-name="ce136" table:number-columns-repeated="25"/>
          <table:table-cell table:number-columns-repeated="38"/>
        </table:table-row>
        <table:table-row table:style-name="ro14" table:number-rows-repeated="821">
          <table:table-cell table:style-name="ce136" table:number-columns-repeated="26"/>
          <table:table-cell table:number-columns-repeated="38"/>
        </table:table-row>
        <table:table-row table:style-name="ro5" table:number-rows-repeated="104772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eral.A1:Geral.Z5 Geral.A7:Geral.Z12 Geral.A14:Geral.Z22 Geral.A24:Geral.A33 Geral.A35:Geral.A855 Geral.B24:Geral.Z855">
            <calcext:condition calcext:apply-style-name="ConditionalStyle_1" calcext:value="formula-is(INDIRECT(&quot;b&quot;&amp;ROW())=&quot;No&quot;)" calcext:base-cell-address="Geral.A1"/>
          </calcext:conditional-format>
          <calcext:conditional-format calcext:target-range-address="Geral.A6:Geral.Z6">
            <calcext:condition calcext:apply-style-name="ConditionalStyle_1" calcext:value="formula-is(INDIRECT(&quot;b&quot;&amp;ROW())=&quot;No&quot;)" calcext:base-cell-address="Geral.A6"/>
          </calcext:conditional-format>
          <calcext:conditional-format calcext:target-range-address="Geral.A13:Geral.Z13">
            <calcext:condition calcext:apply-style-name="ConditionalStyle_1" calcext:value="formula-is(INDIRECT(&quot;b&quot;&amp;ROW())=&quot;No&quot;)" calcext:base-cell-address="Geral.A13"/>
          </calcext:conditional-format>
          <calcext:conditional-format calcext:target-range-address="Geral.A23:Geral.Z23">
            <calcext:condition calcext:apply-style-name="ConditionalStyle_1" calcext:value="formula-is(INDIRECT(&quot;b&quot;&amp;ROW())=&quot;No&quot;)" calcext:base-cell-address="Geral.A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Questrial" svg:font-family="Quest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d8d8d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2">00/00/0000</text:date>, <text:time style:data-style-name="N2" text:time-value="13:43:01.967803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ala" style:display-name="PageStyle_Fa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a" style:display-name="PageStyle_Mot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ÇÃO" style:display-name="PageStyle_DESCRI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são" style:display-name="PageStyle_Vi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gnitiva" style:display-name="PageStyle_Cogniti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ção" style:display-name="PageStyle_Audi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16T11:06:16</meta:creation-date>
    <meta:initial-creator>Ian Hamilton</meta:initial-creator>
    <dc:date>2026-07-02T14:20:52.517955342</dc:date>
    <meta:editing-duration>PT36M41S</meta:editing-duration>
    <meta:editing-cycles>3</meta:editing-cycles>
    <meta:generator>LibreOffice/6.4.7.2$Linux_X86_64 LibreOffice_project/40$Build-2</meta:generator>
    <meta:document-statistic meta:table-count="7" meta:cell-count="405" meta:object-count="0"/>
  </office:meta>
</office:document-meta>
</file>